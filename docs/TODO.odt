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publish() при ошибке Publisher</text:h>
      <text:p text:style-name="Text_20_body">Это самый важный тест, которого сейчас нет.</text:p>
      <text:p text:style-name="Text_20_body">Если Publisher вернул false, то Scheduler обязан:</text:p>
      <text:list text:style-name="L1">
        <text:list-item>
          <text:p text:style-name="P1">не вызывать sender.send() </text:p>
        </text:list-item>
        <text:list-item>
          <text:p text:style-name="P2">не увеличивать sequence </text:p>
        </text:list-item>
      </text:list>
      <text:p text:style-name="Text_20_body">Например:</text:p>
      <text:section text:style-name="Sect1" text:name="code-block-viewer">
        <text:p text:style-name="P3"><text:span text:style-name="Source_20_Text">Subscription sub;</text:span></text:p>
        <text:p text:style-name="P4"><text:span text:style-name="Source_20_Text">sub.tags = { {999} }; <text:s text:c="2"/>// несуществующий тег</text:span></text:p>
      </text:section>
      <text:p text:style-name="Text_20_body">После</text:p>
      <text:section text:style-name="Sect1" text:name="Раздел1">
        <text:p text:style-name="P5"><text:bookmark text:name="code-block-viewer"/><text:span text:style-name="Source_20_Text">scheduler.tick();</text:span></text:p>
      </text:section>
      <text:p text:style-name="Text_20_body">проверяем</text:p>
      <text:section text:style-name="Sect1" text:name="Раздел2">
        <text:p text:style-name="P3"><text:bookmark text:name="code-block-viewer Копия 1"/><text:span text:style-name="Source_20_Text">QCOMPARE(sender.sendCount, 0u);</text:span></text:p>
        <text:p text:style-name="P4"><text:span text:style-name="Source_20_Text">QCOMPARE(manager.find(id)-&gt;sequence, 0u);</text:span></text:p>
      </text:section>
      <text:p text:style-name="Text_20_body">Этот тест гарантирует, что</text:p>
      <text:section text:style-name="Sect1" text:name="Раздел3">
        <text:p text:style-name="P3"><text:bookmark text:name="code-block-viewer Копия 2"/><text:span text:style-name="Source_20_Text">if (!ok)</text:span></text:p>
        <text:p text:style-name="Preformatted_20_Text"><text:span text:style-name="Source_20_Text"><text:s text:c="4"/>continue;</text:span></text:p>
        <text:p text:style-name="Preformatted_20_Text"/>
        <text:p text:style-name="P4"><text:span text:style-name="Source_20_Text">++sub-&gt;sequence;</text:span></text:p>
      </text:section>
      <text:p text:style-name="Text_20_body">никогда не инкрементирует sequence при ошибке.</text:p>
      <text:p text:style-name="Horizontal_20_Line"/>
      <text:h text:style-name="Heading_20_2" text:outline-level="2">2. removeSubscription() отсутствующей подписки</text:h>
      <text:p text:style-name="Text_20_body">Проверить</text:p>
      <text:section text:style-name="Sect1" text:name="Раздел4">
        <text:p text:style-name="P5"><text:bookmark text:name="code-block-viewer Копия 3"/><text:span text:style-name="Source_20_Text">scheduler.removeSubscription(SubscriptionId{777});</text:span></text:p>
      </text:section>
      <text:p text:style-name="Text_20_body">не падает и ничего не меняет.</text:p>
      <text:p text:style-name="Horizontal_20_Line"/>
      <text:h text:style-name="Heading_20_2" text:outline-level="2">3. addSubscription() два раза</text:h>
      <text:p text:style-name="Text_20_body">Например</text:p>
      <text:section text:style-name="Sect1" text:name="Раздел5">
        <text:p text:style-name="P3"><text:bookmark text:name="code-block-viewer Копия 4"/><text:span text:style-name="Source_20_Text">scheduler.addSubscription(id, Hz10);</text:span></text:p>
        <text:p text:style-name="P4"><text:span text:style-name="Source_20_Text">scheduler.addSubscription(id, Hz10);</text:span></text:p>
      </text:section>
      <text:p text:style-name="Text_20_body">После 100 тиков должен уйти <text:span text:style-name="Strong_20_Emphasis">ровно 10</text:span> пакетов, а не 20.</text:p>
      <text:p text:style-name="Text_20_body">Если сейчас используется <text:span text:style-name="Source_20_Text">std::vector</text:span>, такой тест может неожиданно вскрыть дублирование.</text:p>
      <text:p text:style-name="Horizontal_20_Line"/>
      <text:h text:style-name="Heading_20_2" text:outline-level="2"><text:soft-page-break/>4. sequence двух подписок не зависит друг от друга</text:h>
      <text:p text:style-name="Text_20_body">Похожий тест у тебя уже есть.</text:p>
      <text:p text:style-name="Text_20_body">Я бы только проверил содержимое отправленных пакетов.</text:p>
      <text:p text:style-name="Text_20_body">Например</text:p>
      <text:section text:style-name="Sect1" text:name="Раздел6">
        <text:p text:style-name="P3"><text:bookmark text:name="code-block-viewer Копия 5"/><text:span text:style-name="Source_20_Text">sub1 -&gt; seq 0</text:span></text:p>
        <text:p text:style-name="Preformatted_20_Text"><text:span text:style-name="Source_20_Text">sub2 -&gt; seq 0</text:span></text:p>
        <text:p text:style-name="Preformatted_20_Text"><text:span text:style-name="Source_20_Text">sub1 -&gt; seq 1</text:span></text:p>
        <text:p text:style-name="P4"><text:span text:style-name="Source_20_Text">sub2 -&gt; seq 1</text:span></text:p>
      </text:section>
      <text:p text:style-name="Text_20_body">То есть оба счетчика независимы.</text:p>
      <text:p text:style-name="Horizontal_20_Line"/>
      <text:h text:style-name="Heading_20_2" text:outline-level="2">5. scheduler без подписок</text:h>
      <text:section text:style-name="Sect1" text:name="Раздел7">
        <text:p text:style-name="P3"><text:bookmark text:name="code-block-viewer Копия 6"/><text:span text:style-name="Source_20_Text">scheduler.tick();</text:span></text:p>
        <text:p text:style-name="Preformatted_20_Text"><text:span text:style-name="Source_20_Text">scheduler.tick();</text:span></text:p>
        <text:p text:style-name="P4"><text:span text:style-name="Source_20_Text">scheduler.tick();</text:span></text:p>
      </text:section>
      <text:p text:style-name="Text_20_body">Никаких отправок</text:p>
      <text:section text:style-name="Sect1" text:name="Раздел8">
        <text:p text:style-name="P5"><text:bookmark text:name="code-block-viewer Копия 7"/><text:span text:style-name="Source_20_Text">sendCount == 0</text:span></text:p>
      </text:section>
      <text:p text:style-name="Horizontal_20_Line"/>
      <text:h text:style-name="Heading_20_2" text:outline-level="2">6. удаление подписки во время работы</text:h>
      <text:p text:style-name="Text_20_body">Ты уже проверил:</text:p>
      <text:section text:style-name="Sect1" text:name="Раздел9">
        <text:p text:style-name="P3"><text:bookmark text:name="code-block-viewer Копия 8"/><text:span text:style-name="Source_20_Text">tick</text:span></text:p>
        <text:p text:style-name="Preformatted_20_Text"><text:span text:style-name="Source_20_Text">remove</text:span></text:p>
        <text:p text:style-name="P4"><text:span text:style-name="Source_20_Text">tick</text:span></text:p>
      </text:section>
      <text:p text:style-name="Text_20_body">Это отлично.</text:p>
      <text:p text:style-name="Text_20_body">Я бы ещё сделал</text:p>
      <text:section text:style-name="Sect1" text:name="Раздел10">
        <text:p text:style-name="P3"><text:bookmark text:name="code-block-viewer Копия 9"/><text:span text:style-name="Source_20_Text">100Hz</text:span></text:p>
        <text:p text:style-name="Preformatted_20_Text"><text:span text:style-name="Source_20_Text">10Hz</text:span></text:p>
        <text:p text:style-name="Preformatted_20_Text"><text:span text:style-name="Source_20_Text">1Hz</text:span></text:p>
        <text:p text:style-name="Preformatted_20_Text"/>
        <text:p text:style-name="Preformatted_20_Text"><text:span text:style-name="Source_20_Text">удалить 10Hz</text:span></text:p>
        <text:p text:style-name="Preformatted_20_Text"/>
        <text:p text:style-name="P4"><text:span text:style-name="Source_20_Text">100 тиков</text:span></text:p>
      </text:section>
      <text:p text:style-name="Text_20_body">И убедиться</text:p>
      <text:section text:style-name="Sect1" text:name="Раздел11">
        <text:p text:style-name="P3"><text:bookmark text:name="code-block-viewer Копия 10"/><text:span text:style-name="Source_20_Text">100Hz продолжает работать</text:span></text:p>
        <text:p text:style-name="Preformatted_20_Text"><text:span text:style-name="Source_20_Text">1Hz продолжает работать</text:span></text:p>
        <text:p text:style-name="P4"><text:span text:style-name="Source_20_Text">10Hz исчезла</text:span></text:p>
      </text:section>
      <text:p text:style-name="Horizontal_20_Line"/>
      <text:h text:style-name="Heading_20_2" text:outline-level="2"><text:soft-page-break/>7. Timestamp</text:h>
      <text:p text:style-name="Text_20_body">Когда позже появится реальное время,</text:p>
      <text:p text:style-name="Text_20_body">нужно будет проверить</text:p>
      <text:section text:style-name="Sect1" text:name="Раздел12">
        <text:p text:style-name="P5"><text:bookmark text:name="code-block-viewer Копия 11"/><text:span text:style-name="Source_20_Text">timestamp1 &lt; timestamp2 &lt; timestamp3</text:span></text:p>
      </text:section>
      <text:p text:style-name="Text_20_body">Пока этот тест можно отложить.</text:p>
      <text:p text:style-name="Horizontal_20_Line"/>
      <text:h text:style-name="Heading_20_1" text:outline-level="1">Что я бы НЕ тестировал</text:h>
      <text:p text:style-name="Text_20_body">Например,</text:p>
      <text:section text:style-name="Sect1" text:name="Раздел13">
        <text:p text:style-name="P5"><text:bookmark text:name="code-block-viewer Копия 12"/><text:span text:style-name="Source_20_Text">tick миллион раз</text:span></text:p>
      </text:section>
      <text:p text:style-name="Text_20_body">или</text:p>
      <text:section text:style-name="Sect1" text:name="Раздел14">
        <text:p text:style-name="P5"><text:bookmark text:name="code-block-viewer Копия 13"/><text:span text:style-name="Source_20_Text">10000 подписок</text:span></text:p>
      </text:section>
      <text:p text:style-name="Text_20_body">Это уже больше относится к нагрузочному тестированию, а не к модульным тестам.</text:p>
      <text:p text:style-name="Horizontal_20_Line"/>
      <text:h text:style-name="Heading_20_2" text:outline-level="2">Моя оценка</text:h>
      <text:p text:style-name="Text_20_body">На данный момент состояние проекта выглядит примерно так:</text:p>
      <text:list text:style-name="L2">
        <text:list-item>
          <text:p text:style-name="P6"><text:span text:style-name="Strong_20_Emphasis">PacketReader</text:span> — ~100% покрыт. </text:p>
        </text:list-item>
        <text:list-item>
          <text:p text:style-name="P6"><text:span text:style-name="Strong_20_Emphasis">PacketWriter</text:span> — ~100%. </text:p>
        </text:list-item>
        <text:list-item>
          <text:p text:style-name="P6"><text:span text:style-name="Strong_20_Emphasis">UdpServer</text:span> — ~98–100%. </text:p>
        </text:list-item>
        <text:list-item>
          <text:p text:style-name="P6"><text:span text:style-name="Strong_20_Emphasis">Publisher</text:span> — ~100%. </text:p>
        </text:list-item>
        <text:list-item>
          <text:p text:style-name="P6"><text:span text:style-name="Strong_20_Emphasis">LiveStorage</text:span> — ~100%. </text:p>
        </text:list-item>
        <text:list-item>
          <text:p text:style-name="P6"><text:span text:style-name="Strong_20_Emphasis">LiveScheduler</text:span> — около 90%, осталось несколько граничных сценариев. </text:p>
        </text:list-item>
        <text:list-item>
          <text:p text:style-name="P7"><text:span text:style-name="Strong_20_Emphasis">SubscriptionManager</text:span> — ранее тоже выглядел практически полностью покрытым. </text:p>
        </text:list-item>
      </text:list>
      <text:p text:style-name="Text_20_body">После завершения LiveScheduler я бы уже не задерживался на нём. Следующим крупным этапом логично переходить к <text:span text:style-name="Strong_20_Emphasis">реальному времени (timestamp)</text:span> или <text:span text:style-name="Strong_20_Emphasis">сетевому протоколу LiveData</text:span> и интеграции модулей, потому что базовая инфраструктура проекта уже выглядит зрелой и хорошо протестированно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20T15:41:36.025292400</meta:creation-date>
    <dc:date>2026-07-20T15:42:29.847344700</dc:date>
    <meta:editing-duration>PT54S</meta:editing-duration>
    <meta:editing-cycles>1</meta:editing-cycles>
    <meta:document-statistic meta:table-count="0" meta:image-count="0" meta:object-count="0" meta:page-count="3" meta:paragraph-count="80" meta:word-count="316" meta:character-count="2258" meta:non-whitespace-character-count="2010"/>
    <meta:generator>LibreOffice/26.2.4.1$Windows_X86_64 LibreOffice_project/1a563c585d9fd784842a5a6101a714090c4fd0fd</meta:generator>
  </office:meta>
</office:document-meta>
</file>